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4000001986F01A4C2.png" manifest:media-type="image/png"/>
  <manifest:file-entry manifest:full-path="Pictures/100000010000038900000292840A60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0.184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0.6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362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9211e"/>
    </style:style>
    <style:style style:name="ce20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font-name="Liberation Seri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40pt" style:font-size-asian="40pt" style:font-size-complex="40pt"/>
    </style:style>
    <style:style style:name="ce9" style:family="table-cell" style:parent-style-name="Default">
      <style:text-properties fo:font-size="36pt" style:font-size-asian="36pt" style:font-size-complex="36pt"/>
    </style:style>
    <style:style style:name="ce13" style:family="table-cell" style:parent-style-name="Default">
      <style:table-cell-properties fo:background-color="transparent"/>
      <style:text-properties fo:font-size="32pt" style:font-size-asian="32pt" style:font-size-complex="32pt"/>
    </style:style>
    <style:style style:name="ce14" style:family="table-cell" style:parent-style-name="Default">
      <style:text-properties fo:font-size="22pt" style:font-size-asian="22pt" style:font-size-complex="2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7" office:value-type="string" calcext:value-type="string">
            <text:p>Resistor computation for LED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Power supply</text:p>
          </table:table-cell>
          <table:table-cell office:value-type="string" calcext:value-type="string">
            <text:p>Vf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Vf</text:p>
            <text:p>[V]</text:p>
          </table:table-cell>
          <table:table-cell table:style-name="ce20" office:value-type="string" calcext:value-type="string">
            <text:p>I</text:p>
            <text:p>[mA]</text:p>
          </table:table-cell>
          <table:table-cell table:style-name="ce20" office:value-type="string" calcext:value-type="string">
            <text:p>Ures</text:p>
            <text:p>[V]</text:p>
          </table:table-cell>
          <table:table-cell table:style-name="ce20" office:value-type="string" calcext:value-type="string">
            <text:p>R</text:p>
            <text:p>[Ω]</text:p>
          </table:table-cell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Lin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Red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formula="of:=[.$E$3]-[.C5]" office:value-type="float" office:value="1.5" calcext:value-type="float">
            <text:p>1,5</text:p>
          </table:table-cell>
          <table:table-cell table:formula="of:=[.E5]/([.D5]/1000)" office:value-type="float" office:value="750" calcext:value-type="float">
            <text:p>750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<text:a xlink:href="https://www.mouser.fr/ProductDetail/Kingbright/APT2012LSECK-J3-PRV?qs=6oMev5NRZMEkGJkKIsAalQ%3D%3D" xlink:type="simple">https://www.mouser.fr/ProductDetail/Kingbright/APT2012LSECK-J3-PRV?qs=6oMev5NRZMEkGJkKIsAalQ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Green</text:p>
          </table:table-cell>
          <table:table-cell office:value-type="float" office:value="2.65" calcext:value-type="float">
            <text:p>2,65</text:p>
          </table:table-cell>
          <table:table-cell office:value-type="float" office:value="2" calcext:value-type="float">
            <text:p>2</text:p>
          </table:table-cell>
          <table:table-cell table:formula="of:=[.$E$3]-[.C6]" office:value-type="float" office:value="0.65" calcext:value-type="float">
            <text:p>0,65</text:p>
          </table:table-cell>
          <table:table-cell table:formula="of:=[.E6]/([.D6]/1000)" office:value-type="float" office:value="325" calcext:value-type="float">
            <text:p>325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https://www.mouser.fr/ProductDetail/Kingbright/APT2012LZGCK?qs=6oMev5NRZMHOosFiXb%2F3qw%3D%3D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Yellow</text:p>
          </table:table-cell>
          <table:table-cell office:value-type="float" office:value="1.85" calcext:value-type="float">
            <text:p>1,85</text:p>
          </table:table-cell>
          <table:table-cell office:value-type="float" office:value="2" calcext:value-type="float">
            <text:p>2</text:p>
          </table:table-cell>
          <table:table-cell table:formula="of:=[.$E$3]-[.C7]" office:value-type="float" office:value="1.45" calcext:value-type="float">
            <text:p>1,45</text:p>
          </table:table-cell>
          <table:table-cell table:formula="of:=[.E7]/([.D7]/1000)" office:value-type="float" office:value="725" calcext:value-type="float">
            <text:p>725</text:p>
          </table:table-cell>
          <table:table-cell office:value-type="string" calcext:value-type="string">
            <text:p>APT2012LSYCK/J3-PRV</text:p>
          </table:table-cell>
          <table:table-cell office:value-type="string" calcext:value-type="string">
            <text:p><text:a xlink:href="https://www.mouser.fr/ProductDetail/Kingbright/APT2012LSYCK-J3-PRV?qs=6oMev5NRZMGoWLCc4feqUg%3D%3D" xlink:type="simple">https://www.mouser.fr/ProductDetail/Kingbright/APT2012LSYCK-J3-PRV?qs=6oMev5NRZMGoWLCc4feqUg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Blue</text:p>
          </table:table-cell>
          <table:table-cell office:value-type="float" office:value="2.65" calcext:value-type="float">
            <text:p>2,65</text:p>
          </table:table-cell>
          <table:table-cell office:value-type="float" office:value="2" calcext:value-type="float">
            <text:p>2</text:p>
          </table:table-cell>
          <table:table-cell table:formula="of:=[.$E$3]-[.C8]" office:value-type="float" office:value="0.65" calcext:value-type="float">
            <text:p>0,65</text:p>
          </table:table-cell>
          <table:table-cell table:formula="of:=[.E8]/([.D8]/1000)" office:value-type="float" office:value="325" calcext:value-type="float">
            <text:p>325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<text:a xlink:href="https://www.mouser.fr/ProductDetail/Kingbright/APT2012LVBC-D?qs=6oMev5NRZMGErJYT6KZLXg%3D%3D" xlink:type="simple">https://www.mouser.fr/ProductDetail/Kingbright/APT2012LVBC-D?qs=6oMev5NRZMGErJYT6KZLXg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Orange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formula="of:=[.$E$3]-[.C9]" office:value-type="float" office:value="1.5" calcext:value-type="float">
            <text:p>1,5</text:p>
          </table:table-cell>
          <table:table-cell table:formula="of:=[.E9]/([.D9]/1000)" office:value-type="float" office:value="750" calcext:value-type="float">
            <text:p>750</text:p>
          </table:table-cell>
          <table:table-cell office:value-type="string" calcext:value-type="string">
            <text:p>APT2012LSECK/J4-PRV</text:p>
          </table:table-cell>
          <table:table-cell office:value-type="string" calcext:value-type="string">
            <text:p><text:a xlink:href="https://www.mouser.fr/ProductDetail/Kingbright/APT2012LSECK-J4-PRV?qs=6oMev5NRZMH7xdB4zkudcw%3D%3D" xlink:type="simple">https://www.mouser.fr/ProductDetail/Kingbright/APT2012LSECK-J4-PRV?qs=6oMev5NRZMH7xdB4zkudcw%3D%3D</text:a></text:p>
          </table:table-cell>
          <table:table-cell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7"/>
          <table:table-cell table:style-name="ce22"/>
          <table:table-cell/>
        </table:table-row>
        <table:table-row table:style-name="ro2" table:number-rows-repeated="7">
          <table:table-cell table:number-columns-repeated="9"/>
        </table:table-row>
        <table:table-row table:style-name="ro4">
          <table:table-cell table:number-columns-repeated="7"/>
          <table:table-cell table:style-name="ce7"/>
          <table:table-cell table:style-name="ce8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number-columns-repeated="8"/>
          <table:table-cell table:style-name="ce9"/>
        </table:table-row>
        <table:table-row table:style-name="ro2" table:number-rows-repeated="7">
          <table:table-cell table:number-columns-repeated="9"/>
        </table:table-row>
        <table:table-row table:style-name="ro6">
          <table:table-cell table:number-columns-repeated="8"/>
          <table:table-cell table:style-name="ce13"/>
        </table:table-row>
        <table:table-row table:style-name="ro2" table:number-rows-repeated="23">
          <table:table-cell table:number-columns-repeated="9"/>
        </table:table-row>
        <table:table-row table:style-name="ro7">
          <table:table-cell table:number-columns-repeated="8"/>
          <table:table-cell table:style-name="ce14" office:value-type="string" calcext:value-type="string">
            <text:p>OOPPPPPP¨TURTTHHJJKKL%MM%%%%%M¨%MLVJGLGUNUUPPGO PI./IH U?JJFV ? BNBNUTFTJTUJKGKG </text:p>
          </table:table-cell>
        </table:table-row>
        <table:table-row table:style-name="ro2" table:number-rows-repeated="10485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X3485" table:style-name="ta1">
        <table:shapes>
          <draw:frame draw:z-index="0" draw:name="Image 2" draw:style-name="gr1" draw:text-style-name="P1" svg:width="23.814cm" svg:height="10.795cm" svg:x="0.917cm" svg:y="0.624cm">
            <draw:image xlink:href="Pictures/1000000100000384000001986F01A4C2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23.947cm" svg:height="17.411cm" svg:x="25.54cm" svg:y="0.453cm">
            <draw:image xlink:href="Pictures/100000010000038900000292840A6041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Bridge rectifier" table:style-name="ta1"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GW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p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Bridge rectifier forward V /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R to +Vcc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string" calcext:value-type="string">
            <text:p>k</text:p>
          </table:table-cell>
        </table:table-row>
        <table:table-row table:style-name="ro2">
          <table:table-cell/>
          <table:table-cell office:value-type="string" calcext:value-type="string">
            <text:p>R to GND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1/(1/[.G7]+1/[.G7])" office:value-type="float" office:value="3.4" calcext:value-type="float">
            <text:p>3,4</text:p>
          </table:table-cell>
          <table:table-cell office:value-type="string" calcext:value-type="string">
            <text:p>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Input MCU V</text:p>
          </table:table-cell>
          <table:table-cell table:formula="of:=([.C4]-2*[.C5])*[.C8]/([.C7]+[.C8])" office:value-type="float" office:value="3.22314049586777" calcext:value-type="float">
            <text:p>3,22314049586777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([.G4]-2*[.G5])*[.G8]/([.G7]+[.G8])" office:value-type="float" office:value="3.66666666666667" calcext:value-type="float">
            <text:p>3,66666666666667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05:18:44.85755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29T10:35:31.586000000</meta:creation-date>
    <dc:date>2026-06-15T00:56:15.186967500</dc:date>
    <meta:editing-duration>P2DT16H46M59S</meta:editing-duration>
    <meta:editing-cycles>28</meta:editing-cycles>
    <meta:generator>LibreOffice/26.2.3.2$Windows_X86_64 LibreOffice_project/70e089b17412e4cb7773e41413306b17a2328c34</meta:generator>
    <meta:document-statistic meta:table-count="3" meta:cell-count="73" meta:object-count="2"/>
  </office:meta>
</office:document-meta>
</file>